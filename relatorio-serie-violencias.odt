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B2B0000066466CB427DC76095AC.png" manifest:media-type="image/png"/>
  <manifest:file-entry manifest:full-path="Pictures/1000020100000B2B00000664FC87794A5BB069A6.png" manifest:media-type="image/png"/>
  <manifest:file-entry manifest:full-path="Pictures/1000020100000FE700000A4EC4576142AA0668E3.png" manifest:media-type="image/png"/>
  <manifest:file-entry manifest:full-path="Pictures/1000020100000FAB00000A3226E1AB48AE61DC95.png" manifest:media-type="image/png"/>
  <manifest:file-entry manifest:full-path="Pictures/1000020100000FAB00000A32DB2D7558B721AC73.png" manifest:media-type="image/png"/>
  <manifest:file-entry manifest:full-path="Pictures/1000020100000B2600000664F4DD22A754B4E49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ans-serif"/>
    <style:font-face style:name="Liberation Serif1" svg:font-family="'Liberation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1.165cm" fo:margin-left="2.048cm" fo:margin-top="0cm" fo:margin-bottom="0cm" table:align="left" style:may-break-between-rows="true" table:border-model="collapsing"/>
    </style:style>
    <style:style style:name="Tabela1.A" style:family="table-column">
      <style:table-column-properties style:column-width="3.36cm"/>
    </style:style>
    <style:style style:name="Tabela1.B" style:family="table-column">
      <style:table-column-properties style:column-width="7.805cm"/>
    </style:style>
    <style:style style:name="Tabela1.1" style:family="table-row">
      <style:table-row-properties style:min-row-height="0.529cm" fo:keep-together="auto"/>
    </style:style>
    <style:style style:name="Tabela1.A1" style:family="table-cell">
      <style:table-cell-properties style:vertical-align="bottom"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style:vertical-align="bottom" fo:background-color="transparent" fo:padding="0cm" fo:border="none" style:writing-mode="page">
        <style:background-image/>
      </style:table-cell-properties>
    </style:style>
    <style:style style:name="Tabela1.B2" style:family="table-cell" style:data-style-name="N11">
      <style:table-cell-properties style:vertical-align="bottom" fo:background-color="transparent" fo:padding="0cm" fo:border="none" style:writing-mode="page">
        <style:background-image/>
      </style:table-cell-properties>
    </style:style>
    <style:style style:name="Tabela1.A15"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1.B15" style:family="table-cell" style:data-style-name="N11">
      <style:table-cell-properties style:vertical-align="bottom"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line-height="150%" fo:text-align="justify" style:justify-single-word="false"/>
      <style:text-properties officeooo:rsid="0026f1cd" officeooo:paragraph-rsid="0026f1cd"/>
    </style:style>
    <style:style style:name="P2" style:family="paragraph" style:parent-style-name="Standard">
      <style:paragraph-properties fo:line-height="150%" fo:text-align="justify" style:justify-single-word="false"/>
      <style:text-properties officeooo:rsid="001da824" officeooo:paragraph-rsid="001da824"/>
    </style:style>
    <style:style style:name="P3" style:family="paragraph" style:parent-style-name="Standard">
      <style:paragraph-properties fo:line-height="150%" fo:text-align="justify" style:justify-single-word="false"/>
      <style:text-properties officeooo:rsid="002033e1" officeooo:paragraph-rsid="002033e1"/>
    </style:style>
    <style:style style:name="P4" style:family="paragraph" style:parent-style-name="Standard">
      <style:paragraph-properties fo:line-height="150%" fo:text-align="justify" style:justify-single-word="false"/>
      <style:text-properties officeooo:rsid="0022ebf9" officeooo:paragraph-rsid="0022ebf9"/>
    </style:style>
    <style:style style:name="P5" style:family="paragraph" style:parent-style-name="Standard">
      <style:paragraph-properties fo:line-height="150%" fo:text-align="justify" style:justify-single-word="false"/>
      <style:text-properties officeooo:rsid="0023bb7e" officeooo:paragraph-rsid="0023bb7e"/>
    </style:style>
    <style:style style:name="P6" style:family="paragraph" style:parent-style-name="Standard">
      <style:paragraph-properties fo:text-align="start" style:justify-single-word="false"/>
      <style:text-properties fo:font-size="10pt" officeooo:rsid="00280ce8" officeooo:paragraph-rsid="0037469e" style:font-size-asian="8.75pt" style:font-size-complex="10pt"/>
    </style:style>
    <style:style style:name="P7" style:family="paragraph" style:parent-style-name="Standard">
      <style:paragraph-properties fo:text-align="start" style:justify-single-word="false"/>
      <style:text-properties fo:font-size="10pt" officeooo:rsid="00280ce8" officeooo:paragraph-rsid="004f841c" style:font-size-asian="8.75pt" style:font-size-complex="10pt"/>
    </style:style>
    <style:style style:name="P8" style:family="paragraph" style:parent-style-name="Standard">
      <style:paragraph-properties fo:text-align="justify" style:justify-single-word="false"/>
      <style:text-properties fo:font-size="10pt" officeooo:rsid="00280ce8" officeooo:paragraph-rsid="003654fa" style:font-size-asian="8.75pt" style:font-size-complex="10pt"/>
    </style:style>
    <style:style style:name="P9" style:family="paragraph" style:parent-style-name="Standard">
      <style:paragraph-properties fo:text-align="justify" style:justify-single-word="false"/>
      <style:text-properties fo:font-size="10pt" officeooo:rsid="00280ce8" officeooo:paragraph-rsid="00577fd3" style:font-size-asian="8.75pt" style:font-size-complex="10pt"/>
    </style:style>
    <style:style style:name="P10" style:family="paragraph" style:parent-style-name="Standard">
      <style:paragraph-properties fo:text-align="justify" style:justify-single-word="false"/>
      <style:text-properties fo:font-size="10pt" officeooo:rsid="003654fa" officeooo:paragraph-rsid="003654fa" style:font-size-asian="10pt" style:font-size-complex="10pt"/>
    </style:style>
    <style:style style:name="P11" style:family="paragraph" style:parent-style-name="Standard">
      <style:paragraph-properties fo:text-align="justify" style:justify-single-word="false"/>
      <style:text-properties fo:font-size="10pt" officeooo:paragraph-rsid="003e9629" style:font-size-asian="10pt" style:font-size-complex="10pt"/>
    </style:style>
    <style:style style:name="P12" style:family="paragraph" style:parent-style-name="Standard">
      <style:paragraph-properties fo:text-align="justify" style:justify-single-word="false"/>
      <style:text-properties fo:font-size="10pt" officeooo:rsid="0026f1cd" officeooo:paragraph-rsid="004d985e" style:font-size-asian="10pt" style:font-size-complex="10pt"/>
    </style:style>
    <style:style style:name="P13" style:family="paragraph" style:parent-style-name="Standard">
      <style:paragraph-properties fo:text-align="justify" style:justify-single-word="false"/>
      <style:text-properties fo:font-size="10pt" officeooo:rsid="00377584" officeooo:paragraph-rsid="00377584" style:font-size-asian="10pt" style:font-size-complex="10pt"/>
    </style:style>
    <style:style style:name="P14" style:family="paragraph" style:parent-style-name="Standard">
      <style:paragraph-properties fo:text-align="justify" style:justify-single-word="false"/>
      <style:text-properties fo:font-size="10pt" officeooo:rsid="0037469e" officeooo:paragraph-rsid="004d985e" style:font-size-asian="10pt" style:font-size-complex="10pt"/>
    </style:style>
    <style:style style:name="P15" style:family="paragraph" style:parent-style-name="Standard">
      <style:paragraph-properties fo:text-align="justify" style:justify-single-word="false"/>
      <style:text-properties fo:font-size="10pt" officeooo:rsid="00531551" officeooo:paragraph-rsid="00531551" style:font-size-asian="10pt" style:font-size-complex="10pt"/>
    </style:style>
    <style:style style:name="P16" style:family="paragraph" style:parent-style-name="Standard">
      <style:paragraph-properties fo:text-align="justify" style:justify-single-word="false"/>
      <style:text-properties fo:font-size="10pt" officeooo:rsid="00531551" officeooo:paragraph-rsid="00553f57" style:font-size-asian="10pt" style:font-size-complex="10pt"/>
    </style:style>
    <style:style style:name="P17" style:family="paragraph" style:parent-style-name="Standard">
      <style:paragraph-properties fo:line-height="150%" fo:text-align="justify" style:justify-single-word="false"/>
      <style:text-properties fo:font-size="10pt" officeooo:rsid="00531551" officeooo:paragraph-rsid="005e7469" style:font-size-asian="10pt" style:font-size-complex="10pt"/>
    </style:style>
    <style:style style:name="P18" style:family="paragraph" style:parent-style-name="Standard">
      <style:paragraph-properties fo:line-height="150%" fo:text-align="justify" style:justify-single-word="false"/>
      <style:text-properties fo:font-size="10pt" officeooo:rsid="00531551" officeooo:paragraph-rsid="0060aee7" style:font-size-asian="10pt" style:font-size-complex="10pt"/>
    </style:style>
    <style:style style:name="P19" style:family="paragraph" style:parent-style-name="Standard">
      <style:paragraph-properties fo:text-align="justify" style:justify-single-word="false"/>
      <style:text-properties fo:font-size="12pt" officeooo:rsid="0028fa9f" officeooo:paragraph-rsid="0028fa9f" style:font-size-asian="10.5pt" style:font-size-complex="12pt"/>
    </style:style>
    <style:style style:name="P20" style:family="paragraph" style:parent-style-name="Standard">
      <style:paragraph-properties fo:text-align="justify" style:justify-single-word="false"/>
      <style:text-properties fo:font-size="12pt" officeooo:rsid="0028fa9f" officeooo:paragraph-rsid="002e4610" style:font-size-asian="10.5pt" style:font-size-complex="12pt"/>
    </style:style>
    <style:style style:name="P21" style:family="paragraph" style:parent-style-name="Standard">
      <style:paragraph-properties fo:text-align="justify" style:justify-single-word="false"/>
      <style:text-properties fo:font-size="12pt" officeooo:rsid="0028fa9f" officeooo:paragraph-rsid="00531551" style:font-size-asian="10.5pt" style:font-size-complex="12pt"/>
    </style:style>
    <style:style style:name="P22" style:family="paragraph" style:parent-style-name="Standard">
      <style:paragraph-properties fo:text-align="justify" style:justify-single-word="false"/>
      <style:text-properties fo:font-size="12pt" officeooo:rsid="0028fa9f" officeooo:paragraph-rsid="00577fd3" style:font-size-asian="10.5pt" style:font-size-complex="12pt"/>
    </style:style>
    <style:style style:name="P23" style:family="paragraph" style:parent-style-name="Standard">
      <style:paragraph-properties fo:text-align="justify" style:justify-single-word="false"/>
      <style:text-properties fo:font-size="12pt" officeooo:rsid="0028fa9f" officeooo:paragraph-rsid="0026f1cd" style:font-size-asian="10.5pt" style:font-size-complex="12pt"/>
    </style:style>
    <style:style style:name="P24" style:family="paragraph" style:parent-style-name="Standard">
      <style:paragraph-properties fo:text-align="start" style:justify-single-word="false"/>
      <style:text-properties fo:font-size="12pt" officeooo:rsid="0028fa9f" officeooo:paragraph-rsid="0028fa9f" style:font-size-asian="10.5pt" style:font-size-complex="12pt"/>
    </style:style>
    <style:style style:name="P25" style:family="paragraph" style:parent-style-name="Standard">
      <style:paragraph-properties fo:line-height="150%" fo:text-align="justify" style:justify-single-word="false"/>
      <style:text-properties fo:font-size="12pt" officeooo:rsid="0028fa9f" officeooo:paragraph-rsid="0028fa9f" style:font-size-asian="10.5pt" style:font-size-complex="12pt"/>
    </style:style>
    <style:style style:name="P26" style:family="paragraph" style:parent-style-name="Standard">
      <style:paragraph-properties fo:line-height="150%" fo:text-align="justify" style:justify-single-word="false"/>
      <style:text-properties fo:font-size="12pt" officeooo:rsid="002e4610" officeooo:paragraph-rsid="003f3904" style:font-size-asian="10.5pt" style:font-size-complex="12pt"/>
    </style:style>
    <style:style style:name="P27" style:family="paragraph" style:parent-style-name="Standard">
      <style:paragraph-properties fo:text-align="justify" style:justify-single-word="false"/>
      <style:text-properties fo:font-size="12pt" officeooo:rsid="003654fa" officeooo:paragraph-rsid="003654fa" style:font-size-asian="10.5pt" style:font-size-complex="12pt"/>
    </style:style>
    <style:style style:name="P28" style:family="paragraph" style:parent-style-name="Standard">
      <style:paragraph-properties fo:text-align="justify" style:justify-single-word="false"/>
      <style:text-properties fo:font-size="12pt" officeooo:rsid="00377584" officeooo:paragraph-rsid="00377584" style:font-size-asian="10.5pt" style:font-size-complex="12pt"/>
    </style:style>
    <style:style style:name="P29" style:family="paragraph" style:parent-style-name="Standard">
      <style:paragraph-properties fo:text-align="justify" style:justify-single-word="false"/>
      <style:text-properties fo:font-size="12pt" officeooo:rsid="004569cb" officeooo:paragraph-rsid="004569cb" style:font-size-asian="10.5pt" style:font-size-complex="12pt"/>
    </style:style>
    <style:style style:name="P30" style:family="paragraph" style:parent-style-name="Standard">
      <style:paragraph-properties fo:text-align="justify" style:justify-single-word="false"/>
      <style:text-properties fo:font-size="12pt" officeooo:rsid="005249c1" officeooo:paragraph-rsid="005249c1" style:font-size-asian="10.5pt" style:font-size-complex="12pt"/>
    </style:style>
    <style:style style:name="P31" style:family="paragraph" style:parent-style-name="Standard">
      <style:paragraph-properties fo:line-height="150%" fo:text-align="justify" style:justify-single-word="false"/>
      <style:text-properties fo:font-size="12pt" officeooo:rsid="005249c1" officeooo:paragraph-rsid="005249c1" style:font-size-asian="10.5pt" style:font-size-complex="12pt"/>
    </style:style>
    <style:style style:name="P32" style:family="paragraph" style:parent-style-name="Standard">
      <style:paragraph-properties fo:line-height="150%" fo:text-align="justify" style:justify-single-word="false"/>
      <style:text-properties fo:font-size="12pt" officeooo:rsid="00531551" officeooo:paragraph-rsid="00531551" style:font-size-asian="10.5pt" style:font-size-complex="12pt"/>
    </style:style>
    <style:style style:name="P33" style:family="paragraph" style:parent-style-name="Standard">
      <style:paragraph-properties fo:line-height="150%" fo:text-align="justify" style:justify-single-word="false"/>
      <style:text-properties fo:font-size="12pt" officeooo:rsid="004793ca" officeooo:paragraph-rsid="004793ca" style:font-size-asian="10.5pt" style:font-size-complex="12pt"/>
    </style:style>
    <style:style style:name="P34" style:family="paragraph" style:parent-style-name="Standard">
      <style:paragraph-properties fo:line-height="150%" fo:text-align="justify" style:justify-single-word="false"/>
      <style:text-properties fo:font-size="12pt" officeooo:rsid="00555aff" officeooo:paragraph-rsid="00555aff" style:font-size-asian="10.5pt" style:font-size-complex="12pt"/>
    </style:style>
    <style:style style:name="P35" style:family="paragraph" style:parent-style-name="Standard">
      <style:paragraph-properties fo:line-height="150%" fo:text-align="justify" style:justify-single-word="false"/>
      <style:text-properties fo:font-size="12pt" officeooo:rsid="00577fd3" officeooo:paragraph-rsid="00577fd3" style:font-size-asian="12pt" style:font-size-complex="12pt"/>
    </style:style>
    <style:style style:name="P36" style:family="paragraph" style:parent-style-name="Standard">
      <style:paragraph-properties fo:line-height="150%" fo:text-align="justify" style:justify-single-word="false"/>
      <style:text-properties fo:font-size="12pt" officeooo:rsid="005ae358" officeooo:paragraph-rsid="005ae358" style:font-size-asian="12pt" style:font-size-complex="12pt"/>
    </style:style>
    <style:style style:name="P37" style:family="paragraph" style:parent-style-name="Standard">
      <style:paragraph-properties fo:line-height="150%" fo:text-align="justify" style:justify-single-word="false"/>
      <style:text-properties fo:font-size="12pt" officeooo:rsid="005f3b02" officeooo:paragraph-rsid="005f3b02" style:font-size-asian="12pt" style:font-size-complex="12pt"/>
    </style:style>
    <style:style style:name="P38" style:family="paragraph" style:parent-style-name="Standard">
      <style:paragraph-properties fo:text-align="justify" style:justify-single-word="false"/>
      <style:text-properties fo:font-variant="normal" fo:text-transform="none" fo:color="#222222" style:font-name="Arial1" fo:font-size="9.75pt" fo:letter-spacing="normal" fo:font-style="normal" fo:font-weight="normal" officeooo:rsid="0028fa9f" officeooo:paragraph-rsid="0028fa9f" style:font-size-asian="10.5pt" style:font-size-complex="12pt"/>
    </style:style>
    <style:style style:name="P39" style:family="paragraph" style:parent-style-name="Standard">
      <style:paragraph-properties fo:text-align="justify" style:justify-single-word="false"/>
      <style:text-properties officeooo:paragraph-rsid="003e9629"/>
    </style:style>
    <style:style style:name="P40" style:family="paragraph" style:parent-style-name="Standard">
      <style:paragraph-properties fo:line-height="150%" fo:text-align="justify" style:justify-single-word="false"/>
      <style:text-properties officeooo:paragraph-rsid="0060aee7"/>
    </style:style>
    <style:style style:name="P4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officeooo:rsid="0034ae2b" officeooo:paragraph-rsid="0034ae2b"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officeooo:rsid="0060ecd3"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loext:graphic-properties draw:fill="none"/>
      <style:paragraph-properties fo:margin-left="0cm" fo:margin-right="0cm" fo:text-align="center" style:justify-single-word="false" fo:text-indent="0cm" style:auto-text-indent="false" fo:background-color="transparent"/>
      <style:text-properties fo:color="#000000" style:font-name="Liberation Serif1" fo:font-size="10pt" style:font-size-asian="10pt" style:font-size-complex="10pt"/>
    </style:style>
    <style:style style:name="P45" style:family="paragraph" style:parent-style-name="Standard">
      <style:paragraph-properties fo:text-align="justify" style:justify-single-word="false"/>
      <style:text-properties fo:font-size="12pt" officeooo:rsid="0028fa9f" officeooo:paragraph-rsid="0028fa9f" style:font-size-asian="10.5pt" style:font-size-complex="12pt"/>
    </style:style>
    <style:style style:name="P46" style:family="paragraph" style:parent-style-name="Standard">
      <style:paragraph-properties fo:text-align="justify" style:justify-single-word="false"/>
      <style:text-properties fo:font-size="12pt" officeooo:rsid="0065c034" officeooo:paragraph-rsid="0065c034" style:font-size-asian="10.5pt" style:font-size-complex="12pt"/>
    </style:style>
    <style:style style:name="P47" style:family="paragraph" style:parent-style-name="Standard">
      <style:paragraph-properties fo:line-height="150%" fo:text-align="justify" style:justify-single-word="false"/>
      <style:text-properties fo:font-size="12pt" officeooo:rsid="006958bc" officeooo:paragraph-rsid="006958bc" style:font-size-asian="10.5pt" style:font-size-complex="12pt"/>
    </style:style>
    <style:style style:name="P48" style:family="paragraph" style:parent-style-name="Standard">
      <style:paragraph-properties fo:line-height="150%" fo:text-align="justify" style:justify-single-word="false"/>
      <style:text-properties fo:font-size="12pt" officeooo:rsid="006958bc" officeooo:paragraph-rsid="006b43ea" style:font-size-asian="10.5pt" style:font-size-complex="12pt"/>
    </style:style>
    <style:style style:name="P49" style:family="paragraph" style:parent-style-name="Standard">
      <style:paragraph-properties fo:line-height="150%" fo:text-align="justify" style:justify-single-word="false"/>
      <style:text-properties fo:font-size="10pt" officeooo:rsid="00531551" officeooo:paragraph-rsid="0060aee7" style:font-size-asian="10pt" style:font-size-complex="10pt"/>
    </style:style>
    <style:style style:name="P50" style:family="paragraph" style:parent-style-name="Standard">
      <style:paragraph-properties fo:line-height="150%" fo:text-align="justify" style:justify-single-word="false"/>
      <style:text-properties fo:font-size="10pt" officeooo:rsid="00531551" officeooo:paragraph-rsid="0064dd69" style:font-size-asian="10pt" style:font-size-complex="10pt"/>
    </style:style>
    <style:style style:name="P51" style:family="paragraph" style:parent-style-name="Standard">
      <style:paragraph-properties fo:line-height="150%" fo:text-align="justify" style:justify-single-word="false"/>
      <style:text-properties fo:font-size="10pt" officeooo:rsid="00531551" officeooo:paragraph-rsid="006958bc" style:font-size-asian="10pt" style:font-size-complex="10pt"/>
    </style:style>
    <style:style style:name="P52" style:family="paragraph" style:parent-style-name="Standard">
      <style:paragraph-properties fo:line-height="150%" fo:text-align="justify" style:justify-single-word="false"/>
      <style:text-properties fo:font-size="10pt" officeooo:rsid="00531551" officeooo:paragraph-rsid="006bef2a" style:font-size-asian="10pt" style:font-size-complex="10pt"/>
    </style:style>
    <style:style style:name="P53" style:family="paragraph" style:parent-style-name="Standard">
      <style:paragraph-properties fo:text-align="justify" style:justify-single-word="false"/>
      <style:text-properties fo:font-size="14pt" fo:font-weight="bold" officeooo:rsid="0065c034" officeooo:paragraph-rsid="0065c034" style:font-size-asian="14pt" style:font-weight-asian="bold" style:font-size-complex="14pt" style:font-weight-complex="bold"/>
    </style:style>
    <style:style style:name="P54" style:family="paragraph" style:parent-style-name="Standard">
      <style:paragraph-properties fo:line-height="150%" fo:text-align="justify" style:justify-single-word="false"/>
      <style:text-properties fo:font-size="14pt" fo:font-weight="bold" officeooo:rsid="005112d0" officeooo:paragraph-rsid="005112d0" style:font-size-asian="14pt" style:font-weight-asian="bold" style:font-size-complex="14pt" style:font-weight-complex="bold"/>
    </style:style>
    <style:style style:name="T1" style:family="text">
      <style:text-properties officeooo:rsid="001e91fe"/>
    </style:style>
    <style:style style:name="T2" style:family="text">
      <style:text-properties officeooo:rsid="0022ebf9"/>
    </style:style>
    <style:style style:name="T3" style:family="text">
      <style:text-properties officeooo:rsid="0023bb7e"/>
    </style:style>
    <style:style style:name="T4" style:family="text">
      <style:text-properties officeooo:rsid="0025076f"/>
    </style:style>
    <style:style style:name="T5" style:family="text">
      <style:text-properties officeooo:rsid="00273d2d"/>
    </style:style>
    <style:style style:name="T6" style:family="text">
      <style:text-properties officeooo:rsid="00280ce8"/>
    </style:style>
    <style:style style:name="T7" style:family="text">
      <style:text-properties fo:font-variant="normal" fo:text-transform="none" fo:color="#222222" style:font-name="Arial1" fo:font-size="9.75pt" fo:letter-spacing="normal" fo:font-style="normal" fo:font-weight="normal"/>
    </style:style>
    <style:style style:name="T8" style:family="text">
      <style:text-properties officeooo:rsid="002a76c2"/>
    </style:style>
    <style:style style:name="T9" style:family="text">
      <style:text-properties officeooo:rsid="002b78e1"/>
    </style:style>
    <style:style style:name="T10" style:family="text">
      <style:text-properties officeooo:rsid="002fb5ef"/>
    </style:style>
    <style:style style:name="T11" style:family="text">
      <style:text-properties officeooo:rsid="003187ce"/>
    </style:style>
    <style:style style:name="T12" style:family="text">
      <style:text-properties officeooo:rsid="0032d485"/>
    </style:style>
    <style:style style:name="T13" style:family="text">
      <style:text-properties officeooo:rsid="003654fa"/>
    </style:style>
    <style:style style:name="T14" style:family="text">
      <style:text-properties officeooo:rsid="0037469e"/>
    </style:style>
    <style:style style:name="T15" style:family="text">
      <style:text-properties officeooo:rsid="0037d099"/>
    </style:style>
    <style:style style:name="T16" style:family="text">
      <style:text-properties officeooo:rsid="0039bf55"/>
    </style:style>
    <style:style style:name="T17" style:family="text">
      <style:text-properties officeooo:rsid="003b594c"/>
    </style:style>
    <style:style style:name="T18" style:family="text">
      <style:text-properties officeooo:rsid="003cbc13"/>
    </style:style>
    <style:style style:name="T19" style:family="text">
      <style:text-properties officeooo:rsid="003e9629"/>
    </style:style>
    <style:style style:name="T20" style:family="text">
      <style:text-properties fo:font-size="10pt" officeooo:rsid="00280ce8" style:font-size-asian="8.75pt" style:font-size-complex="10pt"/>
    </style:style>
    <style:style style:name="T21" style:family="text">
      <style:text-properties fo:font-size="10pt" officeooo:rsid="003e9629" style:font-size-asian="8.75pt" style:font-size-complex="10pt"/>
    </style:style>
    <style:style style:name="T22" style:family="text">
      <style:text-properties fo:font-size="10pt" style:font-size-asian="10pt" style:font-size-complex="10pt"/>
    </style:style>
    <style:style style:name="T23" style:family="text">
      <style:text-properties fo:font-size="10pt" officeooo:rsid="00531551" style:font-size-asian="10pt" style:font-size-complex="10pt"/>
    </style:style>
    <style:style style:name="T24" style:family="text">
      <style:text-properties fo:font-size="10pt" officeooo:rsid="0060aee7" style:font-size-asian="10pt" style:font-size-complex="10pt"/>
    </style:style>
    <style:style style:name="T25" style:family="text">
      <style:text-properties fo:font-size="10pt" officeooo:rsid="00643f00" style:font-size-asian="10pt" style:font-size-complex="10pt"/>
    </style:style>
    <style:style style:name="T26" style:family="text">
      <style:text-properties fo:font-size="10pt" officeooo:rsid="006b43ea" style:font-size-asian="10pt" style:font-size-complex="10pt"/>
    </style:style>
    <style:style style:name="T27" style:family="text">
      <style:text-properties officeooo:rsid="003f3904"/>
    </style:style>
    <style:style style:name="T28" style:family="text">
      <style:text-properties officeooo:rsid="00411af1"/>
    </style:style>
    <style:style style:name="T29" style:family="text">
      <style:text-properties officeooo:rsid="0041b370"/>
    </style:style>
    <style:style style:name="T30" style:family="text">
      <style:text-properties officeooo:rsid="00422399"/>
    </style:style>
    <style:style style:name="T31" style:family="text">
      <style:text-properties officeooo:rsid="0042aa9c"/>
    </style:style>
    <style:style style:name="T32" style:family="text">
      <style:text-properties officeooo:rsid="004927bd"/>
    </style:style>
    <style:style style:name="T33" style:family="text">
      <style:text-properties officeooo:rsid="004a64c4"/>
    </style:style>
    <style:style style:name="T34" style:family="text">
      <style:text-properties officeooo:rsid="004b65d5"/>
    </style:style>
    <style:style style:name="T35" style:family="text">
      <style:text-properties officeooo:rsid="004c9056"/>
    </style:style>
    <style:style style:name="T36" style:family="text">
      <style:text-properties officeooo:rsid="004c93f7"/>
    </style:style>
    <style:style style:name="T37" style:family="text">
      <style:text-properties officeooo:rsid="005205a4"/>
    </style:style>
    <style:style style:name="T38" style:family="text">
      <style:text-properties officeooo:rsid="00531551"/>
    </style:style>
    <style:style style:name="T39" style:family="text">
      <style:text-properties officeooo:rsid="00546b2f"/>
    </style:style>
    <style:style style:name="T40" style:family="text">
      <style:text-properties officeooo:rsid="0054ee3d"/>
    </style:style>
    <style:style style:name="T41" style:family="text">
      <style:text-properties officeooo:rsid="00553f57"/>
    </style:style>
    <style:style style:name="T42" style:family="text">
      <style:text-properties officeooo:rsid="00555aff"/>
    </style:style>
    <style:style style:name="T43" style:family="text">
      <style:text-properties officeooo:rsid="00574b11"/>
    </style:style>
    <style:style style:name="T44" style:family="text">
      <style:text-properties officeooo:rsid="005903c9"/>
    </style:style>
    <style:style style:name="T45" style:family="text">
      <style:text-properties officeooo:rsid="005ae358"/>
    </style:style>
    <style:style style:name="T46" style:family="text">
      <style:text-properties officeooo:rsid="005be8a7"/>
    </style:style>
    <style:style style:name="T47" style:family="text">
      <style:text-properties officeooo:rsid="005c0f23"/>
    </style:style>
    <style:style style:name="T48" style:family="text">
      <style:text-properties officeooo:rsid="00280ce8" style:font-size-asian="8.75pt"/>
    </style:style>
    <style:style style:name="T49" style:family="text">
      <style:text-properties officeooo:rsid="003e9629" style:font-size-asian="8.75pt"/>
    </style:style>
    <style:style style:name="T50" style:family="text">
      <style:text-properties officeooo:rsid="005dbe03"/>
    </style:style>
    <style:style style:name="T51" style:family="text">
      <style:text-properties officeooo:rsid="005f09f2"/>
    </style:style>
    <style:style style:name="T52" style:family="text">
      <style:text-properties officeooo:rsid="005faec8"/>
    </style:style>
    <style:style style:name="T53" style:family="text">
      <style:text-properties officeooo:rsid="0067288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Relatório Sobre a Ocorrência de Violências contra pessoas Idosas registradas pelo disque 100.</text:p>
      <text:p text:style-name="P2"/>
      <text:p text:style-name="P2"/>
      <text:p text:style-name="P2"/>
      <text:p text:style-name="P2">Sobre os dados de denúncias, temos registros das denúncias que chegaram no dis<text:span text:style-name="T28">que</text:span> 100. A partir desses registros, temos os tipos de violência que foram registrados para cada caso. Os registros de cada tipo de ocorrência de violência, extrapolam a quantidade de denúncias registradas por pessoa. Ou seja, para cada pessoa <text:span text:style-name="T1">que sofreu algum tipo</text:span> de violência, temos mais de um tipo de violência registrado. A contagem dos tipos de violência está considerando quantas vezes o tipo de violência aparece nos registros, <text:span text:style-name="T1">sem considerar que a pessoa sofre apenas um tipo de violência, portanto os números de registros de violência não serão iguais a quantidade de pessoas ou de denúncias, </text:span><text:span text:style-name="T36">eles serão maiores. </text:span></text:p>
      <text:p text:style-name="P3">Temos quatro anos de registros 2023, 2024, 2025 e os valores de 2026. No primeiro momento, faremos o ranqueamento dos tipos de violência <text:span text:style-name="T2">por bairro</text:span> e vamos verificar se existe alguma alteração ou tendência ao longo dos anos entre 2023 a 2025, <text:span text:style-name="T3">pois os valores de 2026 ainda não estão completos. </text:span></text:p>
      <text:p text:style-name="P4">Em um segundo momento vamos verificar se existe alguma relação ou tendência dos tipos de violência associados aos perfis de gênero e idade.</text:p>
      <text:p text:style-name="P5">Para o primeiro caso, como os registros de violência estão agregados em uma mesma célula da planilha, <text:span text:style-name="T4">precisamos separar todas as informações e deixar apenas uma informação por célula, seguindo as boas práticas de registro de informações em bases de dados. Assim, quando separamos essas informações, teremos um número maior de linhas do que anteriormente, e vamos associar cada informação retirada da mesma célula da base de dados, com outra célula informando o bairro de origem da denúncia. Assim, podemos contabilizar os registros de violência a partir de sua ocorrência em cada bairro. </text:span></text:p>
      <text:p text:style-name="P1">Calculamos também o percentual dos registros encontrados, <text:span text:style-name="T5">indicando qual os principais tipos de registros de violência </text:span><text:span text:style-name="T14">no ano de 2024</text:span><text:span text:style-name="T5">. </text:span><text:span text:style-name="T6">Assim como apresentado no gráfico </text:span><text:span text:style-name="T14">1</text:span><text:span text:style-name="T6">.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4"/>
      <text:p text:style-name="P14">Gráfico 1. Porcentagem de registros de violência (2023)</text:p>
      <text:p text:style-name="P23"><draw:frame draw:style-name="fr5" draw:name="Objeto1" text:anchor-type="char" svg:width="16.182cm" svg:height="8.384cm" draw:z-index="3"><draw:object xlink:href="./Object 1" xlink:type="simple" xlink:show="embed" xlink:actuate="onLoad"/><draw:image xlink:href="./ObjectReplacements/Object 1" xlink:type="simple" xlink:show="embed" xlink:actuate="onLoad"/></draw:frame></text:p>
      <text:p text:style-name="P7">Fonte:Dados do Di<text:span text:style-name="T19">s</text:span>que 100</text:p>
      <text:p text:style-name="P24"/>
      <text:p text:style-name="P6"/>
      <text:p text:style-name="P19"/>
      <text:p text:style-name="P25">Segundo Guedes (2025) uma série temporal pode ser definida como uma “uma sucessão de observações de uma variável, coletadas em intervalos regulares de tempo, cujo objetivo reside na identificação de padrões, tendências e estruturas” p.14, que podem possibilitar previsões. <text:span text:style-name="T8">Em um primeiro momento, nossa análise não tem fins preditivos, portanto faremos uma análise afim </text:span><text:span text:style-name="T9">de mostrar algum tipo</text:span><text:span text:style-name="T8"> padr</text:span><text:span text:style-name="T9">ão</text:span><text:span text:style-name="T8"> </text:span><text:span text:style-name="T9">ou tendências</text:span><text:span text:style-name="T8"> ao longo do tempo. </text:span></text:p>
      <text:p text:style-name="P26">Partindo dos registros dos tipos de violência que estão presente na base de dados, conseguimos contabilizar os três anos que estão registrados. Para ordenar os tipos de violência em ordem <text:span text:style-name="T11">de</text:span>crescente, foi utilizado a soma das porcentagen<text:span text:style-name="T10">s de cada ano, </text:span><text:span text:style-name="T11">e posteriormente a porcentagem acumulada foi dividida por três para mantermos o índice de 0 até 100%</text:span><text:span text:style-name="T10"> assim, podemos considerar n</text:span><text:span text:style-name="T27">a média do</text:span><text:span text:style-name="T10"> acumulado dos três anos o tipo de violência que mais foi registrado. </text:span><text:span text:style-name="T11">Conseguimos constatar a partir dessas informações, que a porcentagem de casos de violência psicológica é a maior n</text:span><text:span text:style-name="T18">a média </text:span><text:span text:style-name="T37">dos três anos </text:span><text:span text:style-name="T27">chegando ao valor de </text:span><text:span text:style-name="T12">25,69% conforme podemos observar na tabela 1, </text:span><text:span text:style-name="T11">chega</text:span><text:span text:style-name="T27">ndo</text:span><text:span text:style-name="T11"> a quase 40% dos registros no ano de 2025.</text:span><text:span text:style-name="T12"> </text:span><text:span text:style-name="T16">Em seguida os casos de negligência </text:span><text:span text:style-name="T17">com 24% na média do acumulado dos três anos, </text:span><text:span text:style-name="T30">e chegando a quase 30% nos registros dos anos de 2023 e 2024. </text:span><text:span text:style-name="T31">E em terceiro lugar os casos de maus tratos são 13,29% na média dos três anos e chegam a quase 20% no ano de 2024. </text:span></text:p>
      <text:p text:style-name="P20"/>
      <text:p text:style-name="P20"/>
      <text:p text:style-name="P28"/>
      <text:p text:style-name="P28"><text:soft-page-break/></text:p>
      <text:p text:style-name="P28"/>
      <text:p text:style-name="P28"/>
      <text:p text:style-name="P28"/>
      <text:p text:style-name="P13">Gráfico 2. <text:span text:style-name="T19">Quantidade </text:span>de registros de violência <text:span text:style-name="T29">por ano</text:span> <text:span text:style-name="T15">(%)</text:span></text:p>
      <text:p text:style-name="P19"/>
      <text:p text:style-name="P19"><draw:frame draw:style-name="fr5" draw:name="Objeto2" text:anchor-type="char" svg:width="16.048cm" svg:height="8.998cm" draw:z-index="4"><draw:object xlink:href="./Object 2" xlink:type="simple" xlink:show="embed" xlink:actuate="onLoad"/><draw:image xlink:href="./ObjectReplacements/Object 2" xlink:type="simple" xlink:show="embed" xlink:actuate="onLoad"/></draw:frame></text:p>
      <text:p text:style-name="P8">Fonte: Dados do Di<text:span text:style-name="T19">s</text:span>que 100</text:p>
      <text:p text:style-name="P27"/>
      <text:p text:style-name="P27"/>
      <text:p text:style-name="P27"/>
      <text:p text:style-name="P27"/>
      <text:p text:style-name="P29">A seguir a tabela que contém a média da porcentagem de violências nos três anos, para cada tipo de violência. </text:p>
      <text:p text:style-name="P27"/>
      <text:p text:style-name="P10">Tabela 1. Tipos de violência <text:span text:style-name="T18">média dos três anos</text:span></text:p>
      <table:table table:name="Tabela1" table:style-name="Tabela1">
        <table:table-column table:style-name="Tabela1.A"/>
        <table:table-column table:style-name="Tabela1.B"/>
        <table:table-row table:style-name="Tabela1.1">
          <table:table-cell table:style-name="Tabela1.A1" office:value-type="string">
            <text:p text:style-name="P43">Violência</text:p>
          </table:table-cell>
          <table:table-cell table:style-name="Tabela1.A1" office:value-type="string">
            <text:p text:style-name="P42">Valores <text:span text:style-name="T43">médios</text:span> <text:span text:style-name="T13">(%)</text:span></text:p>
          </table:table-cell>
        </table:table-row>
        <table:table-row table:style-name="Tabela1.1">
          <table:table-cell table:style-name="Tabela1.A2" office:value-type="string">
            <text:p text:style-name="P41">Psicológica</text:p>
          </table:table-cell>
          <table:table-cell table:style-name="Tabela1.B2" office:value-type="percentage" office:value="0.256972614670521">
            <text:p text:style-name="P44">25,70%</text:p>
          </table:table-cell>
        </table:table-row>
        <table:table-row table:style-name="Tabela1.1">
          <table:table-cell table:style-name="Tabela1.A2" office:value-type="string">
            <text:p text:style-name="P41">Negligência</text:p>
          </table:table-cell>
          <table:table-cell table:style-name="Tabela1.B2" office:value-type="percentage" office:value="0.242889063858169">
            <text:p text:style-name="P44">24,29%</text:p>
          </table:table-cell>
        </table:table-row>
        <table:table-row table:style-name="Tabela1.1">
          <table:table-cell table:style-name="Tabela1.A2" office:value-type="string">
            <text:p text:style-name="P41">Maus tratos</text:p>
          </table:table-cell>
          <table:table-cell table:style-name="Tabela1.B2" office:value-type="percentage" office:value="0.132933598470269">
            <text:p text:style-name="P44">13,29%</text:p>
          </table:table-cell>
        </table:table-row>
        <table:table-row table:style-name="Tabela1.1">
          <table:table-cell table:style-name="Tabela1.A2" office:value-type="string">
            <text:p text:style-name="P41">Física</text:p>
          </table:table-cell>
          <table:table-cell table:style-name="Tabela1.B2" office:value-type="percentage" office:value="0.11453301604959">
            <text:p text:style-name="P44">11,45%</text:p>
          </table:table-cell>
        </table:table-row>
        <table:table-row table:style-name="Tabela1.1">
          <table:table-cell table:style-name="Tabela1.A2" office:value-type="string">
            <text:p text:style-name="P41">Patrimonial</text:p>
          </table:table-cell>
          <table:table-cell table:style-name="Tabela1.B2" office:value-type="percentage" office:value="0.110847739920892">
            <text:p text:style-name="P44">11,08%</text:p>
          </table:table-cell>
        </table:table-row>
        <table:table-row table:style-name="Tabela1.1">
          <table:table-cell table:style-name="Tabela1.A2" office:value-type="string">
            <text:p text:style-name="P41">Abandono</text:p>
          </table:table-cell>
          <table:table-cell table:style-name="Tabela1.B2" office:value-type="percentage" office:value="0.0561555075593953">
            <text:p text:style-name="P44">5,62%</text:p>
          </table:table-cell>
        </table:table-row>
        <table:table-row table:style-name="Tabela1.1">
          <table:table-cell table:style-name="Tabela1.A2" office:value-type="string">
            <text:p text:style-name="P41">Verbal</text:p>
          </table:table-cell>
          <table:table-cell table:style-name="Tabela1.B2" office:value-type="percentage" office:value="0.0453492769790073">
            <text:p text:style-name="P44">4,53%</text:p>
          </table:table-cell>
        </table:table-row>
        <table:table-row table:style-name="Tabela1.1">
          <table:table-cell table:style-name="Tabela1.A2" office:value-type="string">
            <text:p text:style-name="P41">Direitos Violados</text:p>
          </table:table-cell>
          <table:table-cell table:style-name="Tabela1.B2" office:value-type="percentage" office:value="0.0163839783405001">
            <text:p text:style-name="P44">1,64%</text:p>
          </table:table-cell>
        </table:table-row>
        <table:table-row table:style-name="Tabela1.1">
          <table:table-cell table:style-name="Tabela1.A2" office:value-type="string">
            <text:p text:style-name="P41">Cárcere Privado</text:p>
          </table:table-cell>
          <table:table-cell table:style-name="Tabela1.B2" office:value-type="percentage" office:value="0.0159724536896102">
            <text:p text:style-name="P44">1,60%</text:p>
          </table:table-cell>
        </table:table-row>
        <table:table-row table:style-name="Tabela1.1">
          <table:table-cell table:style-name="Tabela1.A2" office:value-type="string">
            <text:p text:style-name="P41">Sexual</text:p>
          </table:table-cell>
          <table:table-cell table:style-name="Tabela1.B2" office:value-type="percentage" office:value="0.00272734511864947">
            <text:p text:style-name="P44">0,27%</text:p>
          </table:table-cell>
        </table:table-row>
        <table:table-row table:style-name="Tabela1.1">
          <table:table-cell table:style-name="Tabela1.A2" office:value-type="string">
            <text:p text:style-name="P41">Discriminação</text:p>
          </table:table-cell>
          <table:table-cell table:style-name="Tabela1.B2" office:value-type="percentage" office:value="0.00163569332035855">
            <text:p text:style-name="P44">0,16%</text:p>
          </table:table-cell>
        </table:table-row>
        <table:table-row table:style-name="Tabela1.1">
          <table:table-cell table:style-name="Tabela1.A2" office:value-type="string">
            <text:p text:style-name="P41">Direitos Civis</text:p>
          </table:table-cell>
          <table:table-cell table:style-name="Tabela1.B2" office:value-type="percentage" office:value="0.00143988480921526">
            <text:p text:style-name="P44">0,14%</text:p>
          </table:table-cell>
        </table:table-row>
        <table:table-row table:style-name="Tabela1.1">
          <table:table-cell table:style-name="Tabela1.A2" office:value-type="string">
            <text:p text:style-name="P41">Políticos</text:p>
          </table:table-cell>
          <table:table-cell table:style-name="Tabela1.B2" office:value-type="percentage" office:value="0.0014">
            <text:p text:style-name="P44">0,14%</text:p>
          </table:table-cell>
        </table:table-row>
        <table:table-row table:style-name="Tabela1.1">
          <table:table-cell table:style-name="Tabela1.A15" office:value-type="string">
            <text:p text:style-name="P41">Intolerância</text:p>
          </table:table-cell>
          <table:table-cell table:style-name="Tabela1.B15" office:value-type="percentage" office:value="0.00071994240460763">
            <text:p text:style-name="P44">0,07%</text:p>
          </table:table-cell>
        </table:table-row>
      </table:table>
      <text:p text:style-name="P11"/>
      <text:p text:style-name="P39"><text:span text:style-name="T20">Fonte: Dados do Di</text:span><text:span text:style-name="T21">s</text:span><text:span text:style-name="T20">que 100</text:span></text:p>
      <text:p text:style-name="P19"><text:soft-page-break/></text:p>
      <text:p text:style-name="P33"><text:span text:style-name="T32">Apresentamos no </text:span><text:span text:style-name="T35">G</text:span><text:span text:style-name="T32">ráfico 1, a porcentagem dos tipos de violências</text:span> <text:span text:style-name="T33">para o ano de 2023, no </text:span><text:span text:style-name="T35">G</text:span><text:span text:style-name="T33">ráfico 2 as porcentagens dos tipos de violência para os anos de 2023, 2024 e 2025 </text:span><text:span text:style-name="T34">e</text:span><text:span text:style-name="T33"> na </text:span><text:span text:style-name="T35">T</text:span><text:span text:style-name="T33">abela 1 </text:span><text:span text:style-name="T34">apresentamos a média das porcentagens dos três anos para cada tipo de violência, </text:span><text:span text:style-name="T35">fazendo assim um ranking com a média dos registros de violência que aparecem na nossa base de dados. Com e</text:span>ssas informações, podemos ter uma ideia de quais são as características dos registros de violência e a partir daí direcionar o desenvolvimento de políticas. </text:p>
      <text:p text:style-name="P31">Com os dados que obtivemos com os tipos de violência registrados, conseguimos agrupar essas informações a partir do bairro, contabilizando a quantidade de casos de cada tipo de violência. Ou seja, separamos quantos casos de cada tipo de violência ocorrem nos bairros. Nessa análise não trouxemos todos os bairros, pois a visualização de todas as informações em um único gráfico seria um grande desafio. Assim, trouxemos os cinco bairros com mais casos, ordenando eles de forma decrescente a partir da maior quantidade de ocorrências de tipos de violência, <text:span text:style-name="T38">para os três anos. </text:span></text:p>
      <text:p text:style-name="P30"/>
      <text:p text:style-name="P15"/>
      <text:p text:style-name="P15">Gráfico 3. Tipos de violência registrados por bairro (2023)<draw:frame draw:style-name="fr3" draw:name="Figura1" text:anchor-type="char" svg:x="0cm" svg:y="0.413cm" svg:width="17cm" svg:height="11.061cm" draw:z-index="0"><draw:image xlink:href="Pictures/1000020100000FAB00000A32DB2D7558B721AC73.png" xlink:type="simple" xlink:show="embed" xlink:actuate="onLoad" loext:mime-type="image/png"/></draw:frame></text:p>
      <text:p text:style-name="P21"><text:span text:style-name="T20">Fonte: Dados do Di</text:span><text:span text:style-name="T21">s</text:span><text:span text:style-name="T20">que 100</text:span></text:p>
      <text:p text:style-name="P19"/>
      <text:p text:style-name="P32">No ano de 2023, os principais tipos de ocorrência aparecem no bairro Conjunto Habitacional Requião, com maior quantidade de registros de negligência, com cerca de 7 registros, <text:span text:style-name="T39">nos outros bairros a quantidade de casos de negligência registrados é menor e a média, considerando os cinco bairros, é de 3 casos por bairro. Assim como os casos de negligência, os casos de violência </text:span><text:soft-page-break/><text:span text:style-name="T39">psicológica aparecem em todos os cinco bairros com mais ocorrências. </text:span><text:span text:style-name="T40">Seguido dos casos de violência física, que só não aparecem no bairro Zona 02. </text:span></text:p>
      <text:p text:style-name="P34">A seguir temos <text:span text:style-name="T43">os dados para o ano de 2024</text:span></text:p>
      <text:p text:style-name="P32"/>
      <text:p text:style-name="P16">Gráfico <text:span text:style-name="T42">4</text:span>. Tipos de violência registrados por bairro (202<text:span text:style-name="T41">4</text:span>)</text:p>
      <text:p text:style-name="P22"><draw:frame draw:style-name="fr1" draw:name="Figura2" text:anchor-type="char" svg:width="17cm" svg:height="11.061cm" draw:z-index="1"><draw:image xlink:href="Pictures/1000020100000FAB00000A3226E1AB48AE61DC95.png" xlink:type="simple" xlink:show="embed" xlink:actuate="onLoad" loext:mime-type="image/png"/></draw:frame><text:span text:style-name="T20">Fonte: Dados do Di</text:span><text:span text:style-name="T21">s</text:span><text:span text:style-name="T20">que 100</text:span></text:p>
      <text:p text:style-name="P9"/>
      <text:p text:style-name="P35"><text:span text:style-name="T6">N</text:span>o ano de 2024, o bairro Jardim Alvorada concentrou a maior parte dos registros, os casos de negligência aparecem em todos os bairros, seguidos dos casos de violência psicológica e também de maus tratos. <text:span text:style-name="T44">Que também são, em porcentagem, </text:span><text:span text:style-name="T45">os</text:span><text:span text:style-name="T44"> registros </text:span><text:span text:style-name="T45">de violência que mais aparecem no</text:span><text:span text:style-name="T44"> ano de 2024. </text:span><text:span text:style-name="T46">No ano de 2025, temos algumas tipificações de violência diferentes em relação aos anos anteriores. Casos como Abandono, Direitos Civis, </text:span><text:span text:style-name="T47">Políticos</text:span><text:span text:style-name="T46">, Discriminação e Intolerância foram adicionados nos registros. </text:span><text:span text:style-name="T51">Neste ano, os casos de violência psicológica são os que mais aparecem com 35,85% dos casos seguidos de abandono e negligência, ambos com 16,85% em relação ao total. O bairro com mais casos em 2025 é a Vila Morangueira, seguido do Jardim Alvorada e do Parque Residencial Cidade Nova. </text:span></text:p>
      <text:p text:style-name="P35"/>
      <text:p text:style-name="P35"/>
      <text:p text:style-name="P35"/>
      <text:p text:style-name="P35"/>
      <text:p text:style-name="P35"/>
      <text:p text:style-name="P17"><text:soft-page-break/>Gráfico <text:span text:style-name="T50">5</text:span>. Tipos de violência registrados por bairro (202<text:span text:style-name="T50">5</text:span>)</text:p>
      <text:p text:style-name="P17"><draw:frame draw:style-name="fr1" draw:name="Figura4" text:anchor-type="char" svg:width="17cm" svg:height="11.015cm" draw:z-index="2"><draw:image xlink:href="Pictures/1000020100000FE700000A4EC4576142AA0668E3.png" xlink:type="simple" xlink:show="embed" xlink:actuate="onLoad" loext:mime-type="image/png"/></draw:frame><text:span text:style-name="T48">Fonte: Dados do Di</text:span><text:span text:style-name="T49">s</text:span><text:span text:style-name="T48">que 100</text:span></text:p>
      <text:p text:style-name="P36"/>
      <text:p text:style-name="P37">Sobre a quantidade de registros nos três anos, no primeiro ano de 2023 tivemos <text:span text:style-name="T52">184 registros de ocorrências de violência, no segundo ano de 2024, tivemos 364 registros, totalizando um aumento de cerca de 97,82% nos registros. E no ano de 2025, tivemos 463 registros de violências, totalizando um aumento de 2024 para 2025 de cerca de 27,19%. Se compararmos o ano de 2023 com 2025 vamos perceber um aumento de 151,63% nos registros de violência. <text:s/></text:span></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oft-page-break/><text:span text:style-name="T23">Gráfico </text:span><text:span text:style-name="T24">6</text:span><text:span text:style-name="T23">. </text:span><text:span text:style-name="T24">Quantidade de registros de violência </text:span><text:span text:style-name="T25">(violações)</text:span></text:p>
      <text:p text:style-name="P19"><draw:frame draw:style-name="fr4" draw:name="Objeto3" text:anchor-type="char" svg:x="1.947cm" svg:y="0.222cm" svg:width="13.106cm" svg:height="7.35cm" draw:z-index="5"><draw:object xlink:href="./Object 3" xlink:type="simple" xlink:show="embed" xlink:actuate="onLoad"/><draw:image xlink:href="./ObjectReplacements/Object 3" xlink:type="simple" xlink:show="embed" xlink:actuate="onLoad"/></draw:frame></text:p>
      <text:p text:style-name="P18"><text:span text:style-name="T48"/></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0"><text:span text:style-name="T48">Fonte: Dados do Di</text:span><text:span text:style-name="T49">s</text:span><text:span text:style-name="T48">que 100</text:span></text:p>
      <text:p text:style-name="P19"/>
      <text:p text:style-name="P19"/>
      <text:p text:style-name="P53">Violações por Gênero</text:p>
      <text:p text:style-name="P19"/>
      <text:p text:style-name="P19"/>
      <text:p text:style-name="P46">Primeiro trouxemos as proporções de cada violação, depois as quantidades de violações para os 5 bairros com mais casos, <text:span text:style-name="T53">seguidos da média de cada violação para os três anos, agora fazendo o recorte de gênero, vamos apresentar a quantidade total de violações por gênero e as quantidades de cada violação por gênero. </text:span></text:p>
      <text:p text:style-name="P19"/>
      <text:p text:style-name="P47"><text:span text:style-name="T23">Gráfico </text:span><text:span text:style-name="T22">7</text:span><text:span text:style-name="T23">. </text:span><text:span text:style-name="T24">Quantidade de </text:span><text:span text:style-name="T22">violações por gênero (2023)</text:span></text:p>
      <text:p text:style-name="P51"><draw:frame draw:style-name="fr1" draw:name="Figura3" text:anchor-type="char" svg:width="17cm" svg:height="9.728cm" draw:z-index="6"><draw:image xlink:href="Pictures/1000020100000B2B00000664FC87794A5BB069A6.png" xlink:type="simple" xlink:show="embed" xlink:actuate="onLoad" loext:mime-type="image/png"/></draw:frame><text:span text:style-name="T48">Fonte: Dados do Di</text:span><text:span text:style-name="T49">s</text:span><text:span text:style-name="T48">que 100</text:span></text:p>
      <text:p text:style-name="P19"><text:soft-page-break/></text:p>
      <text:p text:style-name="P19"/>
      <text:p text:style-name="P47"><text:span text:style-name="T23">Gráfico </text:span><text:span text:style-name="T22">8</text:span><text:span text:style-name="T23">. </text:span><text:span text:style-name="T24">Quantidade de </text:span><text:span text:style-name="T22">violações por gênero (2024)</text:span></text:p>
      <text:p text:style-name="P52"><draw:frame draw:style-name="fr2" draw:name="Figura5" text:anchor-type="char" svg:width="17cm" svg:height="9.728cm" draw:z-index="7"><draw:image xlink:href="Pictures/1000020100000B2B0000066466CB427DC76095AC.png" xlink:type="simple" xlink:show="embed" xlink:actuate="onLoad" loext:mime-type="image/png"/></draw:frame><text:span text:style-name="T48">Fonte: Dados do Di</text:span><text:span text:style-name="T49">s</text:span><text:span text:style-name="T48">que 100</text:span></text:p>
      <text:p text:style-name="P48"><text:span text:style-name="T23"/></text:p>
      <text:p text:style-name="P48"><text:span text:style-name="T23"/></text:p>
      <text:p text:style-name="P48"><text:span text:style-name="T23">Gráfico </text:span><text:span text:style-name="T26">9</text:span><text:span text:style-name="T23">. </text:span><text:span text:style-name="T24">Quantidade de </text:span><text:span text:style-name="T22">violações por gênero (202</text:span><text:span text:style-name="T26">5</text:span><text:span text:style-name="T22">)</text:span></text:p>
      <text:p text:style-name="P52"><draw:frame draw:style-name="fr1" draw:name="Figura6" text:anchor-type="char" svg:width="17cm" svg:height="9.745cm" draw:z-index="8"><draw:image xlink:href="Pictures/1000020100000B2600000664F4DD22A754B4E491.png" xlink:type="simple" xlink:show="embed" xlink:actuate="onLoad" loext:mime-type="image/png"/></draw:frame><text:span text:style-name="T48">Fonte: Dados do Di</text:span><text:span text:style-name="T49">s</text:span><text:span text:style-name="T48">que 100</text:span></text:p>
      <text:p text:style-name="P19"><text:tab/></text:p>
      <text:p text:style-name="P19"/>
      <text:p text:style-name="P19"><text:soft-page-break/>REFERÊNCIAS</text:p>
      <text:p text:style-name="P38"/>
      <text:p text:style-name="P19"><text:span text:style-name="T7">GUEDES, Kaio Yukio Gonçalves Vieira. ANÁLISE DE SÉRIES TEMPORAIS: Conceitos e aplicações. 2025.</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ans-serif"/>
    <style:font-face style:name="Liberation Serif1" svg:font-family="'Liberation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6-05-08T12:58:12.538000000</meta:creation-date>
    <dc:date>2026-05-22T12:08:52.780000000</dc:date>
    <meta:editing-duration>PT13H1M</meta:editing-duration>
    <meta:editing-cycles>50</meta:editing-cycles>
    <meta:generator>LibreOffice/6.4.5.2$Windows_X86_64 LibreOffice_project/a726b36747cf2001e06b58ad5db1aa3a9a1872d6</meta:generator>
    <meta:document-statistic meta:table-count="1" meta:image-count="6" meta:object-count="3" meta:page-count="9" meta:paragraph-count="70" meta:word-count="1298" meta:character-count="7912" meta:non-whitespace-character-count="6667"/>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vg:stroke-width="0.026cm"/>
    </style:style>
    <style:style style:name="ch2"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data-style-name="N11">
      <style:chart-properties chart:display-label="true" chart:logarithmic="false" chart:maximum="1"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style:font-size-asian="10pt" style:font-size-complex="10pt"/>
    </style:style>
    <style:style style:name="ch6" style:family="chart" style:data-style-name="N11">
      <style:chart-properties chart:link-data-style-to-source="true" chart:data-label-number="value" chart:data-label-text="false" chart:data-label-symbol="false" chart:label-position="outside"/>
      <style:graphic-properties draw:stroke="none" draw:fill-color="#004586" fo:wrap-option="wrap"/>
      <style:text-properties style:text-position="0% 100%" fo:font-family="Arial"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181cm" svg:height="8.383cm" xlink:href="." xlink:type="simple" chart:class="chart:bar" chart:style-name="ch1">
        <chart:legend chart:legend-position="end" svg:x="13.203cm" svg:y="3.892cm" style:legend-expansion="high" chart:style-name="ch2"/>
        <chart:plot-area chart:style-name="ch3" chart:data-source-has-labels="both" svg:x="0.323cm" svg:y="0.167cm" svg:width="12.557cm" svg:height="8.049cm">
          <chartooo:coordinate-region svg:x="1.923cm" svg:y="0.167cm" svg:width="10.957cm" svg:height="5.486cm"/>
          <chart:axis chart:dimension="x" chart:name="primary-x" chart:style-name="ch4" chartooo:axis-type="auto">
            <chartooo:date-scale/>
            <chart:categories table:cell-range-address="local-table.$A$2:.$A$10"/>
          </chart:axis>
          <chart:axis chart:dimension="y" chart:name="primary-y" chart:style-name="ch5"/>
          <chart:series chart:style-name="ch6" chart:values-cell-range-address="local-table.$B$2:.$B$10" chart:label-cell-address="local-table.$B$1" chart:class="chart:bar">
            <chart:data-point chart:repeated="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 registros</text:p>
              </table:table-cell>
            </table:table-row>
          </table:table-header-rows>
          <table:table-rows>
            <table:table-row>
              <table:table-cell office:value-type="string">
                <text:p>Negligência</text:p>
              </table:table-cell>
              <table:table-cell office:value-type="float" office:value="0.271739130434783">
                <text:p>0.271739130434783</text:p>
              </table:table-cell>
            </table:table-row>
            <table:table-row>
              <table:table-cell office:value-type="string">
                <text:p>Psicológica</text:p>
              </table:table-cell>
              <table:table-cell office:value-type="float" office:value="0.222826086956522">
                <text:p>0.222826086956522</text:p>
              </table:table-cell>
            </table:table-row>
            <table:table-row>
              <table:table-cell office:value-type="string">
                <text:p>Patrimonial</text:p>
              </table:table-cell>
              <table:table-cell office:value-type="float" office:value="0.152173913043478">
                <text:p>0.152173913043478</text:p>
              </table:table-cell>
            </table:table-row>
            <table:table-row>
              <table:table-cell office:value-type="string">
                <text:p>Física</text:p>
              </table:table-cell>
              <table:table-cell office:value-type="float" office:value="0.130434782608696">
                <text:p>0.130434782608696</text:p>
              </table:table-cell>
            </table:table-row>
            <table:table-row>
              <table:table-cell office:value-type="string">
                <text:p>Maus tratos</text:p>
              </table:table-cell>
              <table:table-cell office:value-type="float" office:value="0.108695652173913">
                <text:p>0.108695652173913</text:p>
              </table:table-cell>
            </table:table-row>
            <table:table-row>
              <table:table-cell office:value-type="string">
                <text:p>Verbal</text:p>
              </table:table-cell>
              <table:table-cell office:value-type="float" office:value="0.0489130434782609">
                <text:p>0.0489130434782609</text:p>
              </table:table-cell>
            </table:table-row>
            <table:table-row>
              <table:table-cell office:value-type="string">
                <text:p>Cárcere Privado</text:p>
              </table:table-cell>
              <table:table-cell office:value-type="float" office:value="0.0326086956521739">
                <text:p>0.0326086956521739</text:p>
              </table:table-cell>
            </table:table-row>
            <table:table-row>
              <table:table-cell office:value-type="string">
                <text:p>Direitos Violados</text:p>
              </table:table-cell>
              <table:table-cell office:value-type="float" office:value="0.0271739130434783">
                <text:p>0.0271739130434783</text:p>
              </table:table-cell>
            </table:table-row>
            <table:table-row>
              <table:table-cell office:value-type="string">
                <text:p>Sexual</text:p>
              </table:table-cell>
              <table:table-cell office:value-type="float" office:value="0.00543478260869565">
                <text:p>0.00543478260869565</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data-style-name="N0">
      <style:chart-properties chart:display-label="true" chart:logarithmic="false" chart:maximum="1"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style:font-size-asian="10pt" style:font-size-complex="10pt"/>
    </style:style>
    <style:style style:name="ch7" style:family="chart" style:data-style-name="N0">
      <style:chart-properties chart:link-data-style-to-source="true" chart:label-position="outside"/>
      <style:graphic-properties draw:stroke="none" draw:fill-color="#004586" fo:wrap-option="wrap"/>
      <style:text-properties style:text-position="0% 100%" fo:font-family="Arial" fo:font-size="10pt" style:font-size-asian="10pt" style:font-size-complex="10pt"/>
    </style:style>
    <style:style style:name="ch8" style:family="chart" style:data-style-name="N0">
      <style:chart-properties chart:link-data-style-to-source="true" chart:label-position="outside"/>
      <style:graphic-properties draw:stroke="none" draw:fill-color="#ff420e" fo:wrap-option="wrap"/>
      <style:text-properties style:text-position="0% 100%" fo:font-family="Arial" fo:font-size="10pt" style:font-size-asian="10pt" style:font-size-complex="10pt"/>
    </style:style>
    <style:style style:name="ch9" style:family="chart" style:data-style-name="N0">
      <style:chart-properties chart:link-data-style-to-source="true" chart:label-position="outside"/>
      <style:graphic-properties draw:stroke="none" draw:fill-color="#ffd320" fo:wrap-option="wrap"/>
      <style:text-properties style:text-position="0% 100%" fo:font-family="Arial"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47cm" svg:height="8.997cm" xlink:href="." xlink:type="simple" chart:class="chart:bar" chart:style-name="ch1">
        <chart:subtitle svg:x="0cm" svg:y="0cm" chart:style-name="ch2">
          <text:p/>
        </chart:subtitle>
        <chart:legend chart:legend-position="end" svg:x="14.551cm" svg:y="3.701cm" style:legend-expansion="high" chart:style-name="ch3"/>
        <chart:plot-area chart:style-name="ch4" chart:data-source-has-labels="both" svg:x="0.32cm" svg:y="0.179cm" svg:width="13.911cm" svg:height="8.639cm">
          <chartooo:coordinate-region svg:x="1.246cm" svg:y="0.179cm" svg:width="12.985cm" svg:height="6.076cm"/>
          <chart:axis chart:dimension="x" chart:name="primary-x" chart:style-name="ch5" chartooo:axis-type="auto">
            <chartooo:date-scale/>
            <chart:categories table:cell-range-address="local-table.$A$2:.$A$15"/>
          </chart:axis>
          <chart:axis chart:dimension="y" chart:name="primary-y" chart:style-name="ch6"/>
          <chart:series chart:style-name="ch7" chart:values-cell-range-address="local-table.$B$2:.$B$15" chart:label-cell-address="local-table.$B$1" chart:class="chart:bar">
            <chart:data-point chart:repeated="14"/>
          </chart:series>
          <chart:series chart:style-name="ch8" chart:values-cell-range-address="local-table.$C$2:.$C$15" chart:label-cell-address="local-table.$C$1" chart:class="chart:bar">
            <chart:data-point chart:repeated="14"/>
          </chart:series>
          <chart:series chart:style-name="ch9" chart:values-cell-range-address="local-table.$D$2:.$D$15" chart:label-cell-address="local-table.$D$1" chart:class="chart:bar">
            <chart:data-point chart:repeated="1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23</text:p>
              </table:table-cell>
              <table:table-cell office:value-type="string">
                <text:p>2024</text:p>
              </table:table-cell>
              <table:table-cell office:value-type="string">
                <text:p>2025</text:p>
              </table:table-cell>
            </table:table-row>
          </table:table-header-rows>
          <table:table-rows>
            <table:table-row>
              <table:table-cell office:value-type="string">
                <text:p>Psicológica</text:p>
              </table:table-cell>
              <table:table-cell office:value-type="float" office:value="0.222826086956522">
                <text:p>0.222826086956522</text:p>
              </table:table-cell>
              <table:table-cell office:value-type="float" office:value="0.18956043956044">
                <text:p>0.18956043956044</text:p>
              </table:table-cell>
              <table:table-cell office:value-type="float" office:value="0.3585313174946">
                <text:p>0.3585313174946</text:p>
              </table:table-cell>
            </table:table-row>
            <table:table-row>
              <table:table-cell office:value-type="string">
                <text:p>Negligência</text:p>
              </table:table-cell>
              <table:table-cell office:value-type="float" office:value="0.271739130434783">
                <text:p>0.271739130434783</text:p>
              </table:table-cell>
              <table:table-cell office:value-type="float" office:value="0.288461538461538">
                <text:p>0.288461538461538</text:p>
              </table:table-cell>
              <table:table-cell office:value-type="float" office:value="0.168466522678186">
                <text:p>0.168466522678186</text:p>
              </table:table-cell>
            </table:table-row>
            <table:table-row>
              <table:table-cell office:value-type="string">
                <text:p>Maus tratos</text:p>
              </table:table-cell>
              <table:table-cell office:value-type="float" office:value="0.108695652173913">
                <text:p>0.108695652173913</text:p>
              </table:table-cell>
              <table:table-cell office:value-type="float" office:value="0.164835164835165">
                <text:p>0.164835164835165</text:p>
              </table:table-cell>
              <table:table-cell office:value-type="float" office:value="0.125269978401728">
                <text:p>0.125269978401728</text:p>
              </table:table-cell>
            </table:table-row>
            <table:table-row>
              <table:table-cell office:value-type="string">
                <text:p>Física</text:p>
              </table:table-cell>
              <table:table-cell office:value-type="float" office:value="0.130434782608696">
                <text:p>0.130434782608696</text:p>
              </table:table-cell>
              <table:table-cell office:value-type="float" office:value="0.118131868131868">
                <text:p>0.118131868131868</text:p>
              </table:table-cell>
              <table:table-cell office:value-type="float" office:value="0.0950323974082074">
                <text:p>0.0950323974082074</text:p>
              </table:table-cell>
            </table:table-row>
            <table:table-row>
              <table:table-cell office:value-type="string">
                <text:p>Patrimonial</text:p>
              </table:table-cell>
              <table:table-cell office:value-type="float" office:value="0.152173913043478">
                <text:p>0.152173913043478</text:p>
              </table:table-cell>
              <table:table-cell office:value-type="float" office:value="0.126373626373626">
                <text:p>0.126373626373626</text:p>
              </table:table-cell>
              <table:table-cell office:value-type="float" office:value="0.0539956803455724">
                <text:p>0.0539956803455724</text:p>
              </table:table-cell>
            </table:table-row>
            <table:table-row>
              <table:table-cell office:value-type="string">
                <text:p>Abandono</text:p>
              </table:table-cell>
              <table:table-cell office:value-type="float" office:value="NaN">
                <text:p>NaN</text:p>
              </table:table-cell>
              <table:table-cell office:value-type="float" office:value="NaN">
                <text:p>NaN</text:p>
              </table:table-cell>
              <table:table-cell office:value-type="float" office:value="0.168466522678186">
                <text:p>0.168466522678186</text:p>
              </table:table-cell>
            </table:table-row>
            <table:table-row>
              <table:table-cell office:value-type="string">
                <text:p>Verbal</text:p>
              </table:table-cell>
              <table:table-cell office:value-type="float" office:value="0.0489130434782609">
                <text:p>0.0489130434782609</text:p>
              </table:table-cell>
              <table:table-cell office:value-type="float" office:value="0.0741758241758242">
                <text:p>0.0741758241758242</text:p>
              </table:table-cell>
              <table:table-cell office:value-type="float" office:value="0.0129589632829374">
                <text:p>0.0129589632829374</text:p>
              </table:table-cell>
            </table:table-row>
            <table:table-row>
              <table:table-cell office:value-type="string">
                <text:p>Direitos Violados</text:p>
              </table:table-cell>
              <table:table-cell office:value-type="float" office:value="0.0271739130434783">
                <text:p>0.0271739130434783</text:p>
              </table:table-cell>
              <table:table-cell office:value-type="float" office:value="0.021978021978022">
                <text:p>0.021978021978022</text:p>
              </table:table-cell>
              <table:table-cell office:value-type="float" office:value="NaN">
                <text:p>NaN</text:p>
              </table:table-cell>
            </table:table-row>
            <table:table-row>
              <table:table-cell office:value-type="string">
                <text:p>Cárcere Privado</text:p>
              </table:table-cell>
              <table:table-cell office:value-type="float" office:value="0.0326086956521739">
                <text:p>0.0326086956521739</text:p>
              </table:table-cell>
              <table:table-cell office:value-type="float" office:value="0.010989010989011">
                <text:p>0.010989010989011</text:p>
              </table:table-cell>
              <table:table-cell office:value-type="float" office:value="0.00431965442764579">
                <text:p>0.00431965442764579</text:p>
              </table:table-cell>
            </table:table-row>
            <table:table-row>
              <table:table-cell office:value-type="string">
                <text:p>Sexual</text:p>
              </table:table-cell>
              <table:table-cell office:value-type="float" office:value="0.00543478260869565">
                <text:p>0.00543478260869565</text:p>
              </table:table-cell>
              <table:table-cell office:value-type="float" office:value="0.00274725274725275">
                <text:p>0.00274725274725275</text:p>
              </table:table-cell>
              <table:table-cell office:value-type="float" office:value="NaN">
                <text:p>NaN</text:p>
              </table:table-cell>
            </table:table-row>
            <table:table-row>
              <table:table-cell office:value-type="string">
                <text:p>Discriminação</text:p>
              </table:table-cell>
              <table:table-cell office:value-type="float" office:value="NaN">
                <text:p>NaN</text:p>
              </table:table-cell>
              <table:table-cell office:value-type="float" office:value="0.00274725274725275">
                <text:p>0.00274725274725275</text:p>
              </table:table-cell>
              <table:table-cell office:value-type="float" office:value="0.00215982721382289">
                <text:p>0.00215982721382289</text:p>
              </table:table-cell>
            </table:table-row>
            <table:table-row>
              <table:table-cell office:value-type="string">
                <text:p>Direitos Civis</text:p>
              </table:table-cell>
              <table:table-cell office:value-type="float" office:value="NaN">
                <text:p>NaN</text:p>
              </table:table-cell>
              <table:table-cell office:value-type="float" office:value="NaN">
                <text:p>NaN</text:p>
              </table:table-cell>
              <table:table-cell office:value-type="float" office:value="0.00431965442764579">
                <text:p>0.00431965442764579</text:p>
              </table:table-cell>
            </table:table-row>
            <table:table-row>
              <table:table-cell office:value-type="string">
                <text:p>Políticos</text:p>
              </table:table-cell>
              <table:table-cell office:value-type="float" office:value="NaN">
                <text:p>NaN</text:p>
              </table:table-cell>
              <table:table-cell office:value-type="float" office:value="NaN">
                <text:p>NaN</text:p>
              </table:table-cell>
              <table:table-cell office:value-type="float" office:value="0.00431965442764579">
                <text:p>0.00431965442764579</text:p>
              </table:table-cell>
            </table:table-row>
            <table:table-row>
              <table:table-cell office:value-type="string">
                <text:p>Intolerância</text:p>
              </table:table-cell>
              <table:table-cell office:value-type="float" office:value="NaN">
                <text:p>NaN</text:p>
              </table:table-cell>
              <table:table-cell office:value-type="float" office:value="NaN">
                <text:p>NaN</text:p>
              </table:table-cell>
              <table:table-cell office:value-type="float" office:value="0.00215982721382289">
                <text:p>0.00215982721382289</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solid" svg:stroke-width="0.05cm" svg:stroke-color="#666666" svg:stroke-opacity="80%"/>
    </style:style>
    <style:style style:name="ch2"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data-style-name="N0">
      <style:chart-properties chart:display-label="true" chart:logarithmic="false" chart:maximum="1000"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style:font-size-asian="10pt" style:font-size-complex="10pt"/>
    </style:style>
    <style:style style:name="ch6" style:family="chart" style:data-style-name="N0">
      <style:chart-properties chart:symbol-type="named-symbol" chart:symbol-name="vertical-bar" chart:symbol-width="0.282cm" chart:symbol-height="0.282cm" loext:label-stroke="none" chart:link-data-style-to-source="false" chart:data-label-number="value" chart:data-label-text="false" chart:data-label-symbol="false" chart:label-position="top"/>
      <style:graphic-properties draw:stroke-dash="Dashed_20__28_var_29_" svg:stroke-width="0.05cm" svg:stroke-color="#3465a4" draw:fill-color="#3465a4" fo:wrap-option="wrap"/>
      <style:text-properties style:text-position="0% 100%" fo:font-family="Arial" fo:font-size="10pt" style:font-size-asian="10pt" style:font-size-complex="10pt"/>
    </style:style>
    <style:style style:name="ch7" style:family="chart">
      <style:graphic-properties draw:stroke="solid" svg:stroke-color="#1c1c1c" draw:fill="none" draw:fill-color="#d9d9d9"/>
    </style:style>
    <style:style style:name="ch8" style:family="chart">
      <style:graphic-properties draw:fill-color="#d9d9d9"/>
    </style:style>
  </office:automatic-styles>
  <office:body>
    <office:chart>
      <chart:chart svg:width="13.105cm" svg:height="7.349cm" xlink:href="." xlink:type="simple" chart:class="chart:line" chart:style-name="ch1">
        <chart:legend chart:legend-position="end" svg:x="9.777cm" svg:y="3.375cm" style:legend-expansion="high" chart:style-name="ch2"/>
        <chart:plot-area chart:style-name="ch3" chart:data-source-has-labels="both" svg:x="0.262cm" svg:y="0.146cm" svg:width="9.253cm" svg:height="7.057cm">
          <chartooo:coordinate-region svg:x="1.254cm" svg:y="0.345cm" svg:width="7.889cm" svg:height="6.211cm"/>
          <chart:axis chart:dimension="x" chart:name="primary-x" chart:style-name="ch4" chartooo:axis-type="auto">
            <chartooo:date-scale/>
            <chart:categories table:cell-range-address="local-table.$A$2:.$A$4"/>
          </chart:axis>
          <chart:axis chart:dimension="y" chart:name="primary-y" chart:style-name="ch5"/>
          <chart:series chart:style-name="ch6" chart:values-cell-range-address="local-table.$B$2:.$B$4" chart:label-cell-address="local-table.$B$1" chart:class="chart:line">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Nº Violações</text:p>
              </table:table-cell>
            </table:table-row>
          </table:table-header-rows>
          <table:table-rows>
            <table:table-row>
              <table:table-cell office:value-type="float" office:value="2023">
                <text:p>2023</text:p>
              </table:table-cell>
              <table:table-cell office:value-type="float" office:value="184">
                <text:p>184</text:p>
              </table:table-cell>
            </table:table-row>
            <table:table-row>
              <table:table-cell office:value-type="float" office:value="2024">
                <text:p>2024</text:p>
              </table:table-cell>
              <table:table-cell office:value-type="float" office:value="364">
                <text:p>364</text:p>
              </table:table-cell>
            </table:table-row>
            <table:table-row>
              <table:table-cell office:value-type="float" office:value="2025">
                <text:p>2025</text:p>
              </table:table-cell>
              <table:table-cell office:value-type="float" office:value="463">
                <text:p>463</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office:styles>
</office:document-styles>
</file>